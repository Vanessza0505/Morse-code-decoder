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rse-code-decoder-documentation</text:p>
      <text:p text:style-name="Standard"/>
      <text:p text:style-name="Standard">Who wrote the code: me Vanessza</text:p>
      <text:p text:style-name="Standard"/>
      <text:p text:style-name="Standard">What are the goals of this project?:</text:p>
      <text:p text:style-name="Standard">The goal of this project is to learn how Morse code works.</text:p>
      <text:p text:style-name="Standard">It helps users convert normal text into Morse code and Morse code into text.</text:p>
      <text:p text:style-name="Standard">The project improves basic programming and problem-solving skills.</text:p>
      <text:p text:style-name="Standard">It also helps users understand how information can be translated from one form to another.</text:p>
      <text:p text:style-name="Standard"/>
      <text:p text:style-name="Standard">How is it structured ?:</text:p>
      <text:p text:style-name="Standard">The code structure is the whole code is in the main.rs, but one line is in the cargo.toml file, this line: heapless = "0.8".</text:p>
      <text:p text:style-name="Standard">The logic of the structure is that first i wrote a function that pairs each letter with a Morse code.</text:p>
      <text:p text:style-name="Standard">The second function is to convert an entire text into Morse code.</text:p>
      <text:p text:style-name="Standard">The third and fourth is the beeping functions.</text:p>
      <text:p text:style-name="Standard">The final function that sum all in one and play the morse code.</text:p>
      <text:p text:style-name="Standard">The hardware is just two electronics, first an ESP32 and a beeper, then a couple of cables.</text:p>
      <text:p text:style-name="Standard"/>
      <text:p text:style-name="Standard">Explaining how the code works:</text:p>
      <text:p text:style-name="Standard">The program starts by the ESP32 hardware and timers.</text:p>
      <text:p text:style-name="Standard">GPIO12 is configured as an output and is initially turned off.</text:p>
      <text:p text:style-name="Standard">The user enters a text message and chooses a transmission speed.</text:p>
      <text:p text:style-name="Standard">The text_to_morse() function converts the text into morse code symbols.</text:p>
      <text:p text:style-name="Standard">After that the play_morse() function reads each morse symbol one by one.</text:p>
      <text:p text:style-name="Standard">A dot creates a short signal, while a hyphen creates a longer signal.</text:p>
      <text:p text:style-name="Standard">The beeper turns on and off according to morse code timing.</text:p>
      <text:p text:style-name="Standard">Finally, the morse code is printed to the debug output.</text:p>
      <text:p text:style-name="Standard"/>
      <text:p text:style-name="Standard">Error handling:</text:p>
      <text:p text:style-name="Standard"><text:s text:c="4"/>The program includes a panic handler:</text:p>
      <text:p text:style-name="Standard"><text:s text:c="8"/>#[panic_handler]</text:p>
      <text:p text:style-name="Standard"><text:s text:c="8"/>fn panic(panic_info: &amp;core::panic::PanicInfo) -&gt; ! {</text:p>
      <text:p text:style-name="Standard"><text:s text:c="12"/>error!("{}", panic_info);</text:p>
      <text:p text:style-name="Standard"><text:s text:c="12"/>loop {}</text:p>
      <text:p text:style-name="Standard"><text:s text:c="8"/>}</text:p>
      <text:p text:style-name="Standard"/>
      <text:p text:style-name="Standard">How would an ordinary person use it ?:</text:p>
      <text:p text:style-name="Standard">A user connects an beeper to GPIO12 on the ESP32 board.</text:p>
      <text:p text:style-name="Standard">Then they edit the user_input_text variable and write the message they want to send.</text:p>
      <text:p text:style-name="Standard">The user can also change the wpm value to make the morse code faster or slower.</text:p>
      <text:p text:style-name="Standard">After uploading the program, the ESP32 automatically converts the text into morse code.</text:p>
      <text:p text:style-name="Standard">The beeper beeps according to the message.</text:p>
      <text:p text:style-name="Standard">This project can be used for learning morse code, electronics a little bit, or embedded programming.</text:p>
      <text:p text:style-name="Standard"/>
      <text:p text:style-name="Standard">3 upsides &amp; downsides of this project:</text:p>
      <text:p text:style-name="Standard"><text:s text:c="4"/>Upsides:</text:p>
      <text:p text:style-name="Standard"><text:s text:c="8"/>1. Easy to Use:</text:p>
      <text:p text:style-name="Standard"><text:s text:c="12"/>The user only needs to change the text and speed values.</text:p>
      <text:p text:style-name="Standard"><text:s text:c="8"/>2. Safe Programming Language:</text:p>
      <text:p text:style-name="Standard"><text:s text:c="12"/>Rust helps prevent many common programming errors.</text:p>
      <text:p text:style-name="Standard"><text:s text:c="8"/>3. Good Learning Project:</text:p>
      <text:p text:style-name="Standard"><text:soft-page-break/><text:s text:c="12"/>It teaches GPIO control, timing, and morse code communication.</text:p>
      <text:p text:style-name="Standard"><text:s text:c="4"/>Downsides:</text:p>
      <text:p text:style-name="Standard"><text:s text:c="8"/>1. Fixed Input:</text:p>
      <text:p text:style-name="Standard"><text:s text:c="12"/>The message must be changed in the source code and uploaded again.</text:p>
      <text:p text:style-name="Standard"><text:s text:c="8"/>2. Limited Character Support:</text:p>
      <text:p text:style-name="Standard"><text:s text:c="12"/>Only letters A–Z supported.</text:p>
      <text:p text:style-name="Standard"><text:s text:c="8"/>3. Limited text Size:</text:p>
      <text:p text:style-name="Standard"><text:s text:c="12"/>The text is limited to 250 characters.</text:p>
      <text:p text:style-name="Standard"/>
      <text:p text:style-name="Standard"/>
      <text:p text:style-name="Standard">Future ideas:</text:p>
      <text:p text:style-name="Standard">A torpedo game that involves programming in embedded rust and I use two buttons.</text:p>
      <text:p text:style-name="Standard">And a joint project with my friend, which is a GPS <text:s/>fishing boa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0T19:17:56.950210545</meta:creation-date>
    <meta:generator>LibreOffice/24.2.7.2$Linux_X86_64 LibreOffice_project/420$Build-2</meta:generator>
    <dc:date>2026-06-20T19:20:13.123223144</dc:date>
    <meta:editing-duration>PT2M17S</meta:editing-duration>
    <meta:editing-cycles>1</meta:editing-cycles>
    <meta:document-statistic meta:table-count="0" meta:image-count="0" meta:object-count="0" meta:page-count="2" meta:paragraph-count="55" meta:word-count="471" meta:character-count="2901" meta:non-whitespace-character-count="2305"/>
  </office:meta>
</office:document-meta>
</file>